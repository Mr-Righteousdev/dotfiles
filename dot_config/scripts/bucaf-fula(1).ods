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9783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1.4555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1.6217in"/>
    </style:style>
    <style:style style:name="co10" style:family="table-column">
      <style:table-column-properties fo:break-before="auto" style:column-width="0.1453in"/>
    </style:style>
    <style:style style:name="co11" style:family="table-column">
      <style:table-column-properties fo:break-before="auto" style:column-width="0.6417in"/>
    </style:style>
    <style:style style:name="co12" style:family="table-column">
      <style:table-column-properties fo:break-before="auto" style:column-width="0.5098in"/>
    </style:style>
    <style:style style:name="co13" style:family="table-column">
      <style:table-column-properties fo:break-before="auto" style:column-width="0.6547in"/>
    </style:style>
    <style:style style:name="co14" style:family="table-column">
      <style:table-column-properties fo:break-before="auto" style:column-width="0.0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a9d18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a9d18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" style:family="table-cell" style:parent-style-name="Default">
      <style:table-cell-properties fo:background-color="#ffd966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0.74pt solid #ffffff" fo:background-color="#dce6f1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ffffff" fo:background-color="#b8cce4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ffffff" fo:background-color="#b8cce4" style:diagonal-bl-tr="none" style:diagonal-tl-br="none" style:text-align-source="fix" style:repeat-content="false" fo:border-left="none" fo:border-right="0.74pt solid #ffffff" style:rotation-align="none" fo:border-top="0.74pt solid #ffffff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ce6f1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8cce4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b8cce4" style:diagonal-bl-tr="none" style:diagonal-tl-br="none" style:text-align-source="fix" style:repeat-content="false" fo:border="0.74pt solid #ffffff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00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Farmer Code</text:p>
          </table:table-cell>
          <table:table-cell table:style-name="ce1" office:value-type="string" calcext:value-type="string">
            <text:p>Farmer Name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string" calcext:value-type="string">
            <text:p>Village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string" calcext:value-type="string">
            <text:p>TREES PLANTED</text:p>
          </table:table-cell>
          <table:table-cell table:style-name="ce2" office:value-type="string" calcext:value-type="string">
            <text:p>PRODUCTIVE TREE</text:p>
          </table:table-cell>
          <table:table-cell table:style-name="ce2" office:value-type="string" calcext:value-type="string">
            <text:p>Yield estima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8</text:p>
          </table:table-cell>
          <table:table-cell office:value-type="string" calcext:value-type="string">
            <text:p>Nakacwa Margret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1.5685981580028" calcext:value-type="float">
            <text:p>1.5685981580028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7</text:p>
          </table:table-cell>
          <table:table-cell office:value-type="string" calcext:value-type="string">
            <text:p>Matovu Paul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78651588061766" calcext:value-type="float">
            <text:p>0.78651588061766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400" calcext:value-type="float">
            <text:p>24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4</text:p>
          </table:table-cell>
          <table:table-cell office:value-type="string" calcext:value-type="string">
            <text:p>NAnyunja Agness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35323766959172" calcext:value-type="float">
            <text:p>0.35323766959172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5</text:p>
          </table:table-cell>
          <table:table-cell office:value-type="string" calcext:value-type="string">
            <text:p>Ssekalaala Edward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48080701154534" calcext:value-type="float">
            <text:p>0.48080701154534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3</text:p>
          </table:table-cell>
          <table:table-cell office:value-type="string" calcext:value-type="string">
            <text:p>Basudde John Bosco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76866247108078" calcext:value-type="float">
            <text:p>0.76866247108078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700" calcext:value-type="float">
            <text:p>27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2</text:p>
          </table:table-cell>
          <table:table-cell office:value-type="string" calcext:value-type="string">
            <text:p>Kavule Francis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33088420866347" calcext:value-type="float">
            <text:p>0.3308842086634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8-FAR-00002</text:p>
          </table:table-cell>
          <table:table-cell office:value-type="string" calcext:value-type="string">
            <text:p>WaSAJJA YAHAYA SUDAIS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24170659354068" calcext:value-type="float">
            <text:p>0.24170659354068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225" calcext:value-type="float">
            <text:p>22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G20240413-6923</text:p>
          </table:table-cell>
          <table:table-cell office:value-type="string" calcext:value-type="string">
            <text:p>Jumba Lawrence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86463988871157" calcext:value-type="float">
            <text:p>0.86463988871157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700" calcext:value-type="float">
            <text:p>27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9</text:p>
          </table:table-cell>
          <table:table-cell office:value-type="string" calcext:value-type="string">
            <text:p>Lubuuka Ashiraf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200752406546" calcext:value-type="float">
            <text:p>0.20075240654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31</text:p>
          </table:table-cell>
          <table:table-cell office:value-type="string" calcext:value-type="string">
            <text:p>Biranze Joseph Musoke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4.0692290942919" calcext:value-type="float">
            <text:p>4.0692290942919</text:p>
          </table:table-cell>
          <table:table-cell office:value-type="float" office:value="4700" calcext:value-type="float">
            <text:p>4700</text:p>
          </table:table-cell>
          <table:table-cell office:value-type="float" office:value="4500" calcext:value-type="float">
            <text:p>4500</text:p>
          </table:table-cell>
          <table:table-cell office:value-type="float" office:value="23500" calcext:value-type="float">
            <text:p>235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5</text:p>
          </table:table-cell>
          <table:table-cell office:value-type="string" calcext:value-type="string">
            <text:p>Mbona Frank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82138322898285" calcext:value-type="float">
            <text:p>0.82138322898285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G20240412-6871</text:p>
          </table:table-cell>
          <table:table-cell office:value-type="string" calcext:value-type="string">
            <text:p>Musaazi Abdul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48355887391258" calcext:value-type="float">
            <text:p>0.48355887391258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2</text:p>
          </table:table-cell>
          <table:table-cell office:value-type="string" calcext:value-type="string">
            <text:p>Nansubuga Angel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49004598475768" calcext:value-type="float">
            <text:p>0.49004598475768</text:p>
          </table:table-cell>
          <table:table-cell office:value-type="float" office:value="620" calcext:value-type="float">
            <text:p>620</text:p>
          </table:table-cell>
          <table:table-cell office:value-type="float" office:value="550" calcext:value-type="float">
            <text:p>550</text:p>
          </table:table-cell>
          <table:table-cell office:value-type="float" office:value="1650" calcext:value-type="float">
            <text:p>165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3</text:p>
          </table:table-cell>
          <table:table-cell office:value-type="string" calcext:value-type="string">
            <text:p>Sselubiri Godfrey Kyatelekera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57958672995971" calcext:value-type="float">
            <text:p>0.57958672995971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0</text:p>
          </table:table-cell>
          <table:table-cell office:value-type="string" calcext:value-type="string">
            <text:p>Zizinga Francis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15330706184978" calcext:value-type="float">
            <text:p>0.15330706184978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1</text:p>
          </table:table-cell>
          <table:table-cell office:value-type="string" calcext:value-type="string">
            <text:p>Namuli Jane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17933644235866" calcext:value-type="float">
            <text:p>0.1793364423586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0</text:p>
          </table:table-cell>
          <table:table-cell office:value-type="string" calcext:value-type="string">
            <text:p>Zizinga Francis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25192389657402" calcext:value-type="float">
            <text:p>0.25192389657402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21</text:p>
          </table:table-cell>
          <table:table-cell office:value-type="string" calcext:value-type="string">
            <text:p>Namuli Jane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14378758888873" calcext:value-type="float">
            <text:p>0.14378758888873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360" calcext:value-type="float">
            <text:p>36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9</text:p>
          </table:table-cell>
          <table:table-cell office:value-type="string" calcext:value-type="string">
            <text:p>Musoke Sabiti Katayi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1.2669339906326" calcext:value-type="float">
            <text:p>1.2669339906326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3600" calcext:value-type="float">
            <text:p>36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2</text:p>
          </table:table-cell>
          <table:table-cell office:value-type="string" calcext:value-type="string">
            <text:p>Busulwa Edward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23808080051708" calcext:value-type="float">
            <text:p>0.23808080051708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8</text:p>
          </table:table-cell>
          <table:table-cell office:value-type="string" calcext:value-type="string">
            <text:p>Kalungi John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1.1338644198537" calcext:value-type="float">
            <text:p>1.1338644198537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300" calcext:value-type="float">
            <text:p>33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7</text:p>
          </table:table-cell>
          <table:table-cell office:value-type="string" calcext:value-type="string">
            <text:p>Nakalyango Joan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1.5426279194136" calcext:value-type="float">
            <text:p>1.5426279194136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4700" calcext:value-type="float">
            <text:p>47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G20240413-6916</text:p>
          </table:table-cell>
          <table:table-cell office:value-type="string" calcext:value-type="string">
            <text:p>Sserwadda Ahamad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67405654628421" calcext:value-type="float">
            <text:p>0.67405654628421</text:p>
          </table:table-cell>
          <table:table-cell office:value-type="float" office:value="680" calcext:value-type="float">
            <text:p>68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5</text:p>
          </table:table-cell>
          <table:table-cell office:value-type="string" calcext:value-type="string">
            <text:p>Namiiro Aminah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2.0708329756651" calcext:value-type="float">
            <text:p>2.0708329756651</text:p>
          </table:table-cell>
          <table:table-cell office:value-type="float" office:value="2250" calcext:value-type="float">
            <text:p>2250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8</text:p>
          </table:table-cell>
          <table:table-cell office:value-type="string" calcext:value-type="string">
            <text:p>Ssebuguzi Kenneth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81345051575378" calcext:value-type="float">
            <text:p>0.81345051575378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2400" calcext:value-type="float">
            <text:p>24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5</text:p>
          </table:table-cell>
          <table:table-cell office:value-type="string" calcext:value-type="string">
            <text:p>Nakato Betty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20072407855104" calcext:value-type="float">
            <text:p>0.20072407855104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0</text:p>
          </table:table-cell>
          <table:table-cell office:value-type="string" calcext:value-type="string">
            <text:p>Nabisooli Mary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55692028713784" calcext:value-type="float">
            <text:p>0.55692028713784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9</text:p>
          </table:table-cell>
          <table:table-cell office:value-type="string" calcext:value-type="string">
            <text:p>Matovu Francis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63783114777649" calcext:value-type="float">
            <text:p>0.63783114777649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2100" calcext:value-type="float">
            <text:p>21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7</text:p>
          </table:table-cell>
          <table:table-cell office:value-type="string" calcext:value-type="string">
            <text:p>Muwonge Sulayiti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41321096774729" calcext:value-type="float">
            <text:p>0.41321096774729</text:p>
          </table:table-cell>
          <table:table-cell office:value-type="float" office:value="460" calcext:value-type="float">
            <text:p>460</text:p>
          </table:table-cell>
          <table:table-cell office:value-type="float" office:value="430" calcext:value-type="float">
            <text:p>430</text:p>
          </table:table-cell>
          <table:table-cell office:value-type="float" office:value="1350" calcext:value-type="float">
            <text:p>135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4</text:p>
          </table:table-cell>
          <table:table-cell office:value-type="string" calcext:value-type="string">
            <text:p>Bukenya Kassim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62525145783007" calcext:value-type="float">
            <text:p>0.62525145783007</text:p>
          </table:table-cell>
          <table:table-cell office:value-type="float" office:value="470" calcext:value-type="float">
            <text:p>470</text:p>
          </table:table-cell>
          <table:table-cell office:value-type="float" office:value="410" calcext:value-type="float">
            <text:p>410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G20240412-6866</text:p>
          </table:table-cell>
          <table:table-cell office:value-type="string" calcext:value-type="string">
            <text:p>Nkalubo Godfrey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13458630403976" calcext:value-type="float">
            <text:p>0.13458630403976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6</text:p>
          </table:table-cell>
          <table:table-cell office:value-type="string" calcext:value-type="string">
            <text:p>Nyonjo Ali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1263280373092" calcext:value-type="float">
            <text:p>0.126328037309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14</text:p>
          </table:table-cell>
          <table:table-cell office:value-type="string" calcext:value-type="string">
            <text:p>Nyombi Siraji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36753003870487" calcext:value-type="float">
            <text:p>0.36753003870487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3</text:p>
          </table:table-cell>
          <table:table-cell office:value-type="string" calcext:value-type="string">
            <text:p>Nalunkuuma Betty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83781259141663" calcext:value-type="float">
            <text:p>0.83781259141663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office:value-type="float" office:value="2700" calcext:value-type="float">
            <text:p>27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DU-18055-FAR-00002</text:p>
          </table:table-cell>
          <table:table-cell office:value-type="string" calcext:value-type="string">
            <text:p>Nyanzi Joseph</text:p>
          </table:table-cell>
          <table:table-cell office:value-type="string" calcext:value-type="string">
            <text:p>Kyango Ward</text:p>
          </table:table-cell>
          <table:table-cell office:value-type="string" calcext:value-type="string">
            <text:p>Kyango</text:p>
          </table:table-cell>
          <table:table-cell office:value-type="float" office:value="0.37337161832937" calcext:value-type="float">
            <text:p>0.37337161832937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style-name="Default" table:number-columns-repeated="16376"/>
        </table:table-row>
      </table:table>
      <table:table table:name="Sheet2" table:style-name="ta2">
        <office:forms form:automatic-focus="false" form:apply-design-mode="false"/>
        <table:table-column table:style-name="co9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3" table:default-cell-style-name="ce7"/>
        <table:table-column table:style-name="co8" table:default-cell-style-name="Default"/>
        <table:table-column table:style-name="co8" table:number-columns-repeated="16375"/>
        <table:table-row table:style-name="ro1">
          <table:table-cell table:style-name="ce3" office:value-type="string" calcext:value-type="string">
            <text:p>Farmer Code</text:p>
          </table:table-cell>
          <table:table-cell table:style-name="ce3" office:value-type="string" calcext:value-type="string">
            <text:p>Cooperative</text:p>
          </table:table-cell>
          <table:table-cell table:style-name="ce3" office:value-type="string" calcext:value-type="string">
            <text:p>Farmer Name</text:p>
          </table:table-cell>
          <table:table-cell table:style-name="ce3" office:value-type="string" calcext:value-type="string">
            <text:p>AREA-Hectare</text:p>
          </table:table-cell>
          <table:table-cell table:style-name="ce3" office:value-type="string" calcext:value-type="string">
            <text:p>Other crops</text:p>
          </table:table-cell>
          <table:table-cell table:style-name="ce3" office:value-type="string" calcext:value-type="string">
            <text:p>trees in an Hectare</text:p>
          </table:table-cell>
          <table:table-cell table:style-name="ce3" office:value-type="string" calcext:value-type="string">
            <text:p>Productive tree</text:p>
          </table:table-cell>
          <table:table-cell table:style-name="ce3"/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3-FAR-00063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mbalirwa Noeline</text:p>
          </table:table-cell>
          <table:table-cell office:value-type="float" office:value="0.69766059163385" calcext:value-type="float">
            <text:p>0.69766059163385</text:p>
          </table:table-cell>
          <table:table-cell office:value-type="string" calcext:value-type="string">
            <text:p>Banana,Agroforestry (trees lower than 5 meter)</text:p>
          </table:table-cell>
          <table:table-cell office:value-type="float" office:value="1761" calcext:value-type="float">
            <text:p>1761</text:p>
          </table:table-cell>
          <table:table-cell office:value-type="float" office:value="1750" calcext:value-type="float">
            <text:p>1750</text:p>
          </table:table-cell>
          <table:table-cell office:value-type="float" office:value="1850" calcext:value-type="float">
            <text:p>1850</text:p>
          </table:table-cell>
          <table:table-cell table:formula="of:=([.D2]*555)" office:value-type="float" office:value="387.201628356787" calcext:value-type="float">
            <text:p>387.201628356787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2-FAR-00056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MAWANDA DICKSON</text:p>
          </table:table-cell>
          <table:table-cell table:style-name="ce8" office:value-type="float" office:value="0.19817445482706" calcext:value-type="float">
            <text:p>0.19817445482706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980" calcext:value-type="float">
            <text:p>980</text:p>
          </table:table-cell>
          <table:table-cell table:formula="of:=([.D3]*555)" office:value-type="float" office:value="109.986822429018" calcext:value-type="float">
            <text:p>109.986822429018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G20240412-6764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ttabi Gatrude</text:p>
          </table:table-cell>
          <table:table-cell office:value-type="float" office:value="0.3433414493252" calcext:value-type="float">
            <text:p>0.3433414493252</text:p>
          </table:table-cell>
          <table:table-cell office:value-type="string" calcext:value-type="string">
            <text:p>Banana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620" calcext:value-type="float">
            <text:p>620</text:p>
          </table:table-cell>
          <table:table-cell table:formula="of:=([.D4]*555)" office:value-type="float" office:value="190.554504375486" calcext:value-type="float">
            <text:p>190.554504375486</text:p>
          </table:table-cell>
          <table:table-cell table:style-name="Default" table:number-columns-repeated="16375"/>
        </table:table-row>
        <table:table-row table:style-name="ro1">
          <table:table-cell table:style-name="ce6"/>
          <table:table-cell table:style-name="ce9" office:value-type="string" calcext:value-type="string">
            <text:p>Kitanda Tukole Farmers cooperative society</text:p>
          </table:table-cell>
          <table:table-cell table:style-name="ce9" office:value-type="string" calcext:value-type="string">
            <text:p>Namatovu Florence</text:p>
          </table:table-cell>
          <table:table-cell table:style-name="ce9" office:value-type="float" office:value="0.22986941661634" calcext:value-type="float">
            <text:p>0.22986941661634</text:p>
          </table:table-cell>
          <table:table-cell table:style-name="ce9" office:value-type="string" calcext:value-type="string">
            <text:p>Banana</text:p>
          </table:table-cell>
          <table:table-cell table:style-name="ce9" office:value-type="float" office:value="575" calcext:value-type="float">
            <text:p>575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1210" calcext:value-type="float">
            <text:p>1210</text:p>
          </table:table-cell>
          <table:table-cell table:formula="of:=([.D5]*555)" office:value-type="float" office:value="127.577526222069" calcext:value-type="float">
            <text:p>127.577526222069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5-FAR-00028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iyimba Sarah</text:p>
          </table:table-cell>
          <table:table-cell office:value-type="float" office:value="0.24628842065749" calcext:value-type="float">
            <text:p>0.24628842065749</text:p>
          </table:table-cell>
          <table:table-cell office:value-type="string" calcext:value-type="string">
            <text:p>Banana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table:formula="of:=([.D6]*555)" office:value-type="float" office:value="136.690073464907" calcext:value-type="float">
            <text:p>136.690073464907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2-FAR-00056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MAWANDA DICKSON</text:p>
          </table:table-cell>
          <table:table-cell table:style-name="ce8" office:value-type="float" office:value="0.27999266992189" calcext:value-type="float">
            <text:p>0.27999266992189</text:p>
          </table:table-cell>
          <table:table-cell table:style-name="ce8" office:value-type="string" calcext:value-type="string">
            <text:p>cassava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520" calcext:value-type="float">
            <text:p>520</text:p>
          </table:table-cell>
          <table:table-cell table:formula="of:=([.D7]*555)" office:value-type="float" office:value="155.395931806649" calcext:value-type="float">
            <text:p>155.395931806649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2-FAR-00076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ivumbi Halima</text:p>
          </table:table-cell>
          <table:table-cell office:value-type="float" office:value="1.2314303722962" calcext:value-type="float">
            <text:p>1.2314303722962</text:p>
          </table:table-cell>
          <table:table-cell office:value-type="string" calcext:value-type="string">
            <text:p>Banana</text:p>
          </table:table-cell>
          <table:table-cell office:value-type="float" office:value="875" calcext:value-type="float">
            <text:p>875</text:p>
          </table:table-cell>
          <table:table-cell office:value-type="float" office:value="850" calcext:value-type="float">
            <text:p>850</text:p>
          </table:table-cell>
          <table:table-cell office:value-type="float" office:value="685" calcext:value-type="float">
            <text:p>685</text:p>
          </table:table-cell>
          <table:table-cell table:formula="of:=([.D8]*555)" office:value-type="float" office:value="683.443856624391" calcext:value-type="float">
            <text:p>683.44385662439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5-FAR-00028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iyimba Sarah</text:p>
          </table:table-cell>
          <table:table-cell table:style-name="ce8" office:value-type="float" office:value="0.26422266242797" calcext:value-type="float">
            <text:p>0.26422266242797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510" calcext:value-type="float">
            <text:p>510</text:p>
          </table:table-cell>
          <table:table-cell table:formula="of:=([.D9]*555)" office:value-type="float" office:value="146.643577647523" calcext:value-type="float">
            <text:p>146.643577647523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6-FAR-00058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Mulindwa William Mwasi</text:p>
          </table:table-cell>
          <table:table-cell office:value-type="float" office:value="0.12505737023595" calcext:value-type="float">
            <text:p>0.12505737023595</text:p>
          </table:table-cell>
          <table:table-cell office:value-type="string" calcext:value-type="string">
            <text:p>Banana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611" calcext:value-type="float">
            <text:p>611</text:p>
          </table:table-cell>
          <table:table-cell table:formula="of:=([.D10]*555)" office:value-type="float" office:value="69.4068404809523" calcext:value-type="float">
            <text:p>69.4068404809523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2-FAR-00057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ASAGGA GRACE</text:p>
          </table:table-cell>
          <table:table-cell table:style-name="ce8" office:value-type="float" office:value="0.1392515062984" calcext:value-type="float">
            <text:p>0.1392515062984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380" calcext:value-type="float">
            <text:p>380</text:p>
          </table:table-cell>
          <table:table-cell table:formula="of:=([.D11]*555)" office:value-type="float" office:value="77.284585995612" calcext:value-type="float">
            <text:p>77.284585995612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2-FAR-00055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KABAGANBE MOURIN</text:p>
          </table:table-cell>
          <table:table-cell office:value-type="float" office:value="0.14628478689181" calcext:value-type="float">
            <text:p>0.14628478689181</text:p>
          </table:table-cell>
          <table:table-cell office:value-type="string" calcext:value-type="string">
            <text:p>cassava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formula="of:=([.D12]*555)" office:value-type="float" office:value="81.1880567249546" calcext:value-type="float">
            <text:p>81.1880567249546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5-FAR-00027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ASAMAIT ESTHER</text:p>
          </table:table-cell>
          <table:table-cell table:style-name="ce8" office:value-type="float" office:value="0.28710538573108" calcext:value-type="float">
            <text:p>0.28710538573108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620" calcext:value-type="float">
            <text:p>620</text:p>
          </table:table-cell>
          <table:table-cell table:formula="of:=([.D13]*555)" office:value-type="float" office:value="159.343489080749" calcext:value-type="float">
            <text:p>159.343489080749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2-FAR-00057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ASAGGA GRACE</text:p>
          </table:table-cell>
          <table:table-cell office:value-type="float" office:value="0.20858962046113" calcext:value-type="float">
            <text:p>0.20858962046113</text:p>
          </table:table-cell>
          <table:table-cell office:value-type="string" calcext:value-type="string">
            <text:p>Banana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500" calcext:value-type="float">
            <text:p>500</text:p>
          </table:table-cell>
          <table:table-cell table:formula="of:=([.D14]*555)" office:value-type="float" office:value="115.767239355927" calcext:value-type="float">
            <text:p>115.767239355927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G20240412-6719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Katenda Francis</text:p>
          </table:table-cell>
          <table:table-cell table:style-name="ce8" office:value-type="float" office:value="0.23163863353665" calcext:value-type="float">
            <text:p>0.23163863353665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840" calcext:value-type="float">
            <text:p>840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562" calcext:value-type="float">
            <text:p>562</text:p>
          </table:table-cell>
          <table:table-cell table:formula="of:=([.D15]*555)" office:value-type="float" office:value="128.559441612841" calcext:value-type="float">
            <text:p>128.55944161284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5-FAR-00026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LUBEGA VICENT</text:p>
          </table:table-cell>
          <table:table-cell office:value-type="float" office:value="1.4526952016341" calcext:value-type="float">
            <text:p>1.4526952016341</text:p>
          </table:table-cell>
          <table:table-cell office:value-type="string" calcext:value-type="string">
            <text:p>Banana</text:p>
          </table:table-cell>
          <table:table-cell office:value-type="float" office:value="450" calcext:value-type="float">
            <text:p>450</text:p>
          </table:table-cell>
          <table:table-cell office:value-type="float" office:value="430" calcext:value-type="float">
            <text:p>430</text:p>
          </table:table-cell>
          <table:table-cell office:value-type="float" office:value="3500" calcext:value-type="float">
            <text:p>3500</text:p>
          </table:table-cell>
          <table:table-cell table:formula="of:=([.D16]*555)" office:value-type="float" office:value="806.245836906925" calcext:value-type="float">
            <text:p>806.245836906925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77-FAR-00034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KASAGGA BEN</text:p>
          </table:table-cell>
          <table:table-cell table:style-name="ce8" office:value-type="float" office:value="0.20718285033472" calcext:value-type="float">
            <text:p>0.20718285033472</text:p>
          </table:table-cell>
          <table:table-cell table:style-name="ce8" office:value-type="string" calcext:value-type="string">
            <text:p>Banana,casssava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1112" calcext:value-type="float">
            <text:p>1112</text:p>
          </table:table-cell>
          <table:table-cell table:formula="of:=([.D17]*555)" office:value-type="float" office:value="114.98648193577" calcext:value-type="float">
            <text:p>114.98648193577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2-FAR-00074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ruyima Siifah</text:p>
          </table:table-cell>
          <table:table-cell office:value-type="float" office:value="0.34959276947613" calcext:value-type="float">
            <text:p>0.34959276947613</text:p>
          </table:table-cell>
          <table:table-cell office:value-type="string" calcext:value-type="string">
            <text:p>Banana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628" calcext:value-type="float">
            <text:p>628</text:p>
          </table:table-cell>
          <table:table-cell table:formula="of:=([.D18]*555)" office:value-type="float" office:value="194.023987059252" calcext:value-type="float">
            <text:p>194.023987059252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77-FAR-00034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KASAGGA BEN</text:p>
          </table:table-cell>
          <table:table-cell table:style-name="ce8" office:value-type="float" office:value="0.13481633975458" calcext:value-type="float">
            <text:p>0.13481633975458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401" calcext:value-type="float">
            <text:p>401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62" calcext:value-type="float">
            <text:p>262</text:p>
          </table:table-cell>
          <table:table-cell table:formula="of:=([.D19]*555)" office:value-type="float" office:value="74.8230685637919" calcext:value-type="float">
            <text:p>74.8230685637919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2-FAR-00075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Bwanika Jf Mayanja</text:p>
          </table:table-cell>
          <table:table-cell office:value-type="float" office:value="0.24452522892573" calcext:value-type="float">
            <text:p>0.24452522892573</text:p>
          </table:table-cell>
          <table:table-cell office:value-type="string" calcext:value-type="string">
            <text:p>casava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470" calcext:value-type="float">
            <text:p>470</text:p>
          </table:table-cell>
          <table:table-cell table:formula="of:=([.D20]*555)" office:value-type="float" office:value="135.71150205378" calcext:value-type="float">
            <text:p>135.71150205378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5-FAR-00026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LUBEGA VICENT</text:p>
          </table:table-cell>
          <table:table-cell table:style-name="ce8" office:value-type="float" office:value="0.3792554062731" calcext:value-type="float">
            <text:p>0.3792554062731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920" calcext:value-type="float">
            <text:p>920</text:p>
          </table:table-cell>
          <table:table-cell table:formula="of:=([.D21]*555)" office:value-type="float" office:value="210.486750481571" calcext:value-type="float">
            <text:p>210.48675048157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3-FAR-00061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dagire Noelina</text:p>
          </table:table-cell>
          <table:table-cell office:value-type="float" office:value="0.093313550380524" calcext:value-type="float">
            <text:p>0.093313550380524</text:p>
          </table:table-cell>
          <table:table-cell office:value-type="string" calcext:value-type="string">
            <text:p>Banana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table:formula="of:=([.D22]*555)" office:value-type="float" office:value="51.7890204611908" calcext:value-type="float">
            <text:p>51.7890204611908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2-FAR-00072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Sseggwanyi Eddie</text:p>
          </table:table-cell>
          <table:table-cell table:style-name="ce8" office:value-type="float" office:value="0.50162802988708" calcext:value-type="float">
            <text:p>0.50162802988708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400" calcext:value-type="float">
            <text:p>1400</text:p>
          </table:table-cell>
          <table:table-cell table:formula="of:=([.D23]*555)" office:value-type="float" office:value="278.403556587329" calcext:value-type="float">
            <text:p>278.403556587329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3-FAR-00062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abogo catherine</text:p>
          </table:table-cell>
          <table:table-cell office:value-type="float" office:value="0.82704982022253" calcext:value-type="float">
            <text:p>0.82704982022253</text:p>
          </table:table-cell>
          <table:table-cell office:value-type="string" calcext:value-type="string">
            <text:p>Banana,cassava</text:p>
          </table:table-cell>
          <table:table-cell office:value-type="float" office:value="806" calcext:value-type="float">
            <text:p>806</text:p>
          </table:table-cell>
          <table:table-cell office:value-type="float" office:value="757" calcext:value-type="float">
            <text:p>757</text:p>
          </table:table-cell>
          <table:table-cell office:value-type="float" office:value="2345" calcext:value-type="float">
            <text:p>2345</text:p>
          </table:table-cell>
          <table:table-cell table:formula="of:=([.D24]*555)" office:value-type="float" office:value="459.012650223504" calcext:value-type="float">
            <text:p>459.01265022350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3-FAR-00062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abogo catherine</text:p>
          </table:table-cell>
          <table:table-cell table:style-name="ce8" office:value-type="float" office:value="0.13590283882064" calcext:value-type="float">
            <text:p>0.13590283882064</text:p>
          </table:table-cell>
          <table:table-cell table:style-name="ce8" office:value-type="string" calcext:value-type="string">
            <text:p>Banana,cassava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316" calcext:value-type="float">
            <text:p>316</text:p>
          </table:table-cell>
          <table:table-cell table:formula="of:=([.D25]*555)" office:value-type="float" office:value="75.4260755454552" calcext:value-type="float">
            <text:p>75.4260755454552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77-FAR-00041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MULI BETTY</text:p>
          </table:table-cell>
          <table:table-cell office:value-type="float" office:value="0.21666250013245" calcext:value-type="float">
            <text:p>0.21666250013245</text:p>
          </table:table-cell>
          <table:table-cell office:value-type="string" calcext:value-type="string">
            <text:p>Banana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528" calcext:value-type="float">
            <text:p>528</text:p>
          </table:table-cell>
          <table:table-cell table:formula="of:=([.D26]*555)" office:value-type="float" office:value="120.24768757351" calcext:value-type="float">
            <text:p>120.2476875735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4-FAR-00008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Sserwadda Emmanuel</text:p>
          </table:table-cell>
          <table:table-cell table:style-name="ce8" office:value-type="float" office:value="0.10636239697049" calcext:value-type="float">
            <text:p>0.10636239697049</text:p>
          </table:table-cell>
          <table:table-cell table:style-name="ce8" office:value-type="string" calcext:value-type="string">
            <text:p>Banana,cassava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31" calcext:value-type="float">
            <text:p>231</text:p>
          </table:table-cell>
          <table:table-cell table:formula="of:=([.D27]*555)" office:value-type="float" office:value="59.031130318622" calcext:value-type="float">
            <text:p>59.031130318622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77-FAR-00024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Byekwaso Augustine</text:p>
          </table:table-cell>
          <table:table-cell office:value-type="float" office:value="0.52746038344559" calcext:value-type="float">
            <text:p>0.52746038344559</text:p>
          </table:table-cell>
          <table:table-cell office:value-type="string" calcext:value-type="string">
            <text:p>Banana,cassava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  <table:table-cell office:value-type="float" office:value="1052" calcext:value-type="float">
            <text:p>1052</text:p>
          </table:table-cell>
          <table:table-cell table:formula="of:=([.D28]*555)" office:value-type="float" office:value="292.740512812302" calcext:value-type="float">
            <text:p>292.740512812302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77-FAR-00038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TALE GODFREY</text:p>
          </table:table-cell>
          <table:table-cell table:style-name="ce8" office:value-type="float" office:value="0.14094644494726" calcext:value-type="float">
            <text:p>0.14094644494726</text:p>
          </table:table-cell>
          <table:table-cell table:style-name="ce8" office:value-type="string" calcext:value-type="string">
            <text:p>Banana,cassava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261" calcext:value-type="float">
            <text:p>261</text:p>
          </table:table-cell>
          <table:table-cell table:formula="of:=([.D29]*555)" office:value-type="float" office:value="78.2252769457293" calcext:value-type="float">
            <text:p>78.2252769457293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G20240412-6724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Makubuya Ronald</text:p>
          </table:table-cell>
          <table:table-cell office:value-type="float" office:value="0.56797245701166" calcext:value-type="float">
            <text:p>0.56797245701166</text:p>
          </table:table-cell>
          <table:table-cell office:value-type="string" calcext:value-type="string">
            <text:p>Banana,cassava</text:p>
          </table:table-cell>
          <table:table-cell office:value-type="float" office:value="1939" calcext:value-type="float">
            <text:p>1939</text:p>
          </table:table-cell>
          <table:table-cell office:value-type="float" office:value="1931" calcext:value-type="float">
            <text:p>1931</text:p>
          </table:table-cell>
          <table:table-cell office:value-type="float" office:value="1082" calcext:value-type="float">
            <text:p>1082</text:p>
          </table:table-cell>
          <table:table-cell table:formula="of:=([.D30]*555)" office:value-type="float" office:value="315.224713641471" calcext:value-type="float">
            <text:p>315.22471364147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G20240412-6724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Makubuya Ronald</text:p>
          </table:table-cell>
          <table:table-cell table:style-name="ce8" office:value-type="float" office:value="0.15616314164311" calcext:value-type="float">
            <text:p>0.15616314164311</text:p>
          </table:table-cell>
          <table:table-cell table:style-name="ce8" office:value-type="string" calcext:value-type="string">
            <text:p>cassava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139" calcext:value-type="float">
            <text:p>139</text:p>
          </table:table-cell>
          <table:table-cell table:formula="of:=([.D31]*555)" office:value-type="float" office:value="86.6705436119261" calcext:value-type="float">
            <text:p>86.670543611926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4-FAR-00007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Ssebalamu Ivan</text:p>
          </table:table-cell>
          <table:table-cell office:value-type="float" office:value="0.094697016083134" calcext:value-type="float">
            <text:p>0.094697016083134</text:p>
          </table:table-cell>
          <table:table-cell office:value-type="string" calcext:value-type="string">
            <text:p>Banana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161" calcext:value-type="float">
            <text:p>161</text:p>
          </table:table-cell>
          <table:table-cell table:formula="of:=([.D32]*555)" office:value-type="float" office:value="52.5568439261394" calcext:value-type="float">
            <text:p>52.556843926139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4-FAR-00007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Ssebalamu Ivan</text:p>
          </table:table-cell>
          <table:table-cell table:style-name="ce8" office:value-type="float" office:value="0.14460940614716" calcext:value-type="float">
            <text:p>0.14460940614716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259" calcext:value-type="float">
            <text:p>259</text:p>
          </table:table-cell>
          <table:table-cell table:formula="of:=([.D33]*555)" office:value-type="float" office:value="80.2582204116738" calcext:value-type="float">
            <text:p>80.2582204116738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6-FAR-00056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achwa Maxencia</text:p>
          </table:table-cell>
          <table:table-cell office:value-type="float" office:value="0.4122973032741" calcext:value-type="float">
            <text:p>0.4122973032741</text:p>
          </table:table-cell>
          <table:table-cell office:value-type="string" calcext:value-type="string">
            <text:p>Banana,cassava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1021" calcext:value-type="float">
            <text:p>1021</text:p>
          </table:table-cell>
          <table:table-cell table:formula="of:=([.D34]*555)" office:value-type="float" office:value="228.825003317126" calcext:value-type="float">
            <text:p>228.825003317126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G20240416-6966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Byarugaba Byarugaba Paul</text:p>
          </table:table-cell>
          <table:table-cell table:style-name="ce8" office:value-type="float" office:value="0.13686172875291" calcext:value-type="float">
            <text:p>0.13686172875291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52" calcext:value-type="float">
            <text:p>152</text:p>
          </table:table-cell>
          <table:table-cell table:formula="of:=([.D35]*555)" office:value-type="float" office:value="75.9582594578651" calcext:value-type="float">
            <text:p>75.958259457865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6-FAR-00052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maganda Sarah</text:p>
          </table:table-cell>
          <table:table-cell office:value-type="float" office:value="0.2319199322113" calcext:value-type="float">
            <text:p>0.2319199322113</text:p>
          </table:table-cell>
          <table:table-cell office:value-type="string" calcext:value-type="string">
            <text:p>Banana</text:p>
          </table:table-cell>
          <table:table-cell office:value-type="float" office:value="589" calcext:value-type="float">
            <text:p>589</text:p>
          </table:table-cell>
          <table:table-cell office:value-type="float" office:value="580" calcext:value-type="float">
            <text:p>580</text:p>
          </table:table-cell>
          <table:table-cell office:value-type="float" office:value="1335" calcext:value-type="float">
            <text:p>1335</text:p>
          </table:table-cell>
          <table:table-cell table:formula="of:=([.D36]*555)" office:value-type="float" office:value="128.715562377272" calcext:value-type="float">
            <text:p>128.715562377272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77-FAR-00039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MYALO NORA</text:p>
          </table:table-cell>
          <table:table-cell table:style-name="ce8" office:value-type="float" office:value="0.20176047520776" calcext:value-type="float">
            <text:p>0.20176047520776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511" calcext:value-type="float">
            <text:p>511</text:p>
          </table:table-cell>
          <table:table-cell table:style-name="ce8" office:value-type="float" office:value="1030" calcext:value-type="float">
            <text:p>1030</text:p>
          </table:table-cell>
          <table:table-cell table:formula="of:=([.D37]*555)" office:value-type="float" office:value="111.977063740307" calcext:value-type="float">
            <text:p>111.977063740307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6-FAR-00053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musoke Sifah</text:p>
          </table:table-cell>
          <table:table-cell office:value-type="float" office:value="0.13282556797076" calcext:value-type="float">
            <text:p>0.13282556797076</text:p>
          </table:table-cell>
          <table:table-cell office:value-type="string" calcext:value-type="string">
            <text:p>Banana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242" calcext:value-type="float">
            <text:p>242</text:p>
          </table:table-cell>
          <table:table-cell table:formula="of:=([.D38]*555)" office:value-type="float" office:value="73.7181902237718" calcext:value-type="float">
            <text:p>73.7181902237718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6-FAR-00051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Ssempala Henry</text:p>
          </table:table-cell>
          <table:table-cell table:style-name="ce8" office:value-type="float" office:value="0.24024401291323" calcext:value-type="float">
            <text:p>0.24024401291323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621" calcext:value-type="float">
            <text:p>621</text:p>
          </table:table-cell>
          <table:table-cell table:style-name="ce8" office:value-type="float" office:value="606" calcext:value-type="float">
            <text:p>606</text:p>
          </table:table-cell>
          <table:table-cell table:style-name="ce8" office:value-type="float" office:value="2512" calcext:value-type="float">
            <text:p>2512</text:p>
          </table:table-cell>
          <table:table-cell table:formula="of:=([.D39]*555)" office:value-type="float" office:value="133.335427166843" calcext:value-type="float">
            <text:p>133.335427166843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2-FAR-00054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MUWONGE STEPHEN BOGERE</text:p>
          </table:table-cell>
          <table:table-cell office:value-type="float" office:value="0.10590546083577" calcext:value-type="float">
            <text:p>0.10590546083577</text:p>
          </table:table-cell>
          <table:table-cell office:value-type="string" calcext:value-type="string">
            <text:p>Banana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table:formula="of:=([.D40]*555)" office:value-type="float" office:value="58.7775307638524" calcext:value-type="float">
            <text:p>58.777530763852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2-FAR-00071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alema Molly</text:p>
          </table:table-cell>
          <table:table-cell table:style-name="ce8" office:value-type="float" office:value="0.87080377384465" calcext:value-type="float">
            <text:p>0.87080377384465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600" calcext:value-type="float">
            <text:p>1600</text:p>
          </table:table-cell>
          <table:table-cell table:formula="of:=([.D41]*555)" office:value-type="float" office:value="483.296094483781" calcext:value-type="float">
            <text:p>483.29609448378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3-FAR-00059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Muyomba Paul</text:p>
          </table:table-cell>
          <table:table-cell office:value-type="float" office:value="0.2036473585732" calcext:value-type="float">
            <text:p>0.2036473585732</text:p>
          </table:table-cell>
          <table:table-cell office:value-type="string" calcext:value-type="string">
            <text:p>Banana,cassava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formula="of:=([.D42]*555)" office:value-type="float" office:value="113.024284008126" calcext:value-type="float">
            <text:p>113.024284008126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77-FAR-00030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AGGWA VIOLA</text:p>
          </table:table-cell>
          <table:table-cell table:style-name="ce8" office:value-type="float" office:value="0.11610791532057" calcext:value-type="float">
            <text:p>0.11610791532057</text:p>
          </table:table-cell>
          <table:table-cell table:style-name="ce8" office:value-type="string" calcext:value-type="string">
            <text:p>Banana,cassava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0" calcext:value-type="float">
            <text:p>100</text:p>
          </table:table-cell>
          <table:table-cell table:formula="of:=([.D43]*555)" office:value-type="float" office:value="64.4398930029164" calcext:value-type="float">
            <text:p>64.4398930029164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77-FAR-00030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AGGWA VIOLA</text:p>
          </table:table-cell>
          <table:table-cell office:value-type="float" office:value="0.17785228304944" calcext:value-type="float">
            <text:p>0.17785228304944</text:p>
          </table:table-cell>
          <table:table-cell office:value-type="string" calcext:value-type="string">
            <text:p>Banana,cassava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table:formula="of:=([.D44]*555)" office:value-type="float" office:value="98.7080170924392" calcext:value-type="float">
            <text:p>98.7080170924392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3-FAR-00059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Muyomba Paul</text:p>
          </table:table-cell>
          <table:table-cell table:style-name="ce8" office:value-type="float" office:value="0.11276267506921" calcext:value-type="float">
            <text:p>0.11276267506921</text:p>
          </table:table-cell>
          <table:table-cell table:style-name="ce8" office:value-type="string" calcext:value-type="string">
            <text:p>cassav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100" calcext:value-type="float">
            <text:p>100</text:p>
          </table:table-cell>
          <table:table-cell table:formula="of:=([.D45]*555)" office:value-type="float" office:value="62.5832846634116" calcext:value-type="float">
            <text:p>62.5832846634116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3-FAR-00056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kato Janefer</text:p>
          </table:table-cell>
          <table:table-cell office:value-type="float" office:value="0.1610333244099" calcext:value-type="float">
            <text:p>0.1610333244099</text:p>
          </table:table-cell>
          <table:table-cell office:value-type="string" calcext:value-type="string">
            <text:p>Banana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380" calcext:value-type="float">
            <text:p>380</text:p>
          </table:table-cell>
          <table:table-cell table:formula="of:=([.D46]*555)" office:value-type="float" office:value="89.3734950474945" calcext:value-type="float">
            <text:p>89.3734950474945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3-FAR-00056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ato Janefer</text:p>
          </table:table-cell>
          <table:table-cell table:style-name="ce8" office:value-type="float" office:value="0.12056718712204" calcext:value-type="float">
            <text:p>0.12056718712204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202" calcext:value-type="float">
            <text:p>202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formula="of:=([.D47]*555)" office:value-type="float" office:value="66.9147888527322" calcext:value-type="float">
            <text:p>66.9147888527322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2-FAR-00052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DAWULA MUHAMMAD</text:p>
          </table:table-cell>
          <table:table-cell office:value-type="float" office:value="0.33792387751411" calcext:value-type="float">
            <text:p>0.33792387751411</text:p>
          </table:table-cell>
          <table:table-cell office:value-type="string" calcext:value-type="string">
            <text:p>Banana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260" calcext:value-type="float">
            <text:p>260</text:p>
          </table:table-cell>
          <table:table-cell table:formula="of:=([.D48]*555)" office:value-type="float" office:value="187.547752020331" calcext:value-type="float">
            <text:p>187.54775202033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5-FAR-00025</text:p>
          </table:table-cell>
          <table:table-cell table:style-name="ce8" office:value-type="string" calcext:value-type="string">
            <text:p>Ndugu - Bukomansimbi - Biganda</text:p>
          </table:table-cell>
          <table:table-cell table:style-name="ce8" office:value-type="string" calcext:value-type="string">
            <text:p>Namuganda Jane</text:p>
          </table:table-cell>
          <table:table-cell table:style-name="ce8" office:value-type="float" office:value="0.14823496278312" calcext:value-type="float">
            <text:p>0.14823496278312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250" calcext:value-type="float">
            <text:p>250</text:p>
          </table:table-cell>
          <table:table-cell table:formula="of:=([.D49]*555)" office:value-type="float" office:value="82.2704043446316" calcext:value-type="float">
            <text:p>82.2704043446316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2-FAR-00053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LUMU BULUHANE</text:p>
          </table:table-cell>
          <table:table-cell office:value-type="float" office:value="0.23613396406853" calcext:value-type="float">
            <text:p>0.23613396406853</text:p>
          </table:table-cell>
          <table:table-cell office:value-type="string" calcext:value-type="string">
            <text:p>cassava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252" calcext:value-type="float">
            <text:p>252</text:p>
          </table:table-cell>
          <table:table-cell table:formula="of:=([.D50]*555)" office:value-type="float" office:value="131.054350058034" calcext:value-type="float">
            <text:p>131.05435005803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G20240412-6559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Mboyigabo Fred</text:p>
          </table:table-cell>
          <table:table-cell table:style-name="ce8" office:value-type="float" office:value="0.13893896455006" calcext:value-type="float">
            <text:p>0.13893896455006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49" calcext:value-type="float">
            <text:p>349</text:p>
          </table:table-cell>
          <table:table-cell table:formula="of:=([.D51]*555)" office:value-type="float" office:value="77.1111253252833" calcext:value-type="float">
            <text:p>77.1111253252833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2-FAR-00068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tensibe Swaibu</text:p>
          </table:table-cell>
          <table:table-cell office:value-type="float" office:value="0.37549764579678" calcext:value-type="float">
            <text:p>0.37549764579678</text:p>
          </table:table-cell>
          <table:table-cell office:value-type="string" calcext:value-type="string">
            <text:p>Banana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D52]*555)" office:value-type="float" office:value="208.401193417213" calcext:value-type="float">
            <text:p>208.401193417213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2-FAR-00068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tensibe Swaibu</text:p>
          </table:table-cell>
          <table:table-cell table:style-name="ce8" office:value-type="float" office:value="1.5176142260935" calcext:value-type="float">
            <text:p>1.5176142260935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1495" calcext:value-type="float">
            <text:p>1495</text:p>
          </table:table-cell>
          <table:table-cell table:style-name="ce8" office:value-type="float" office:value="1400" calcext:value-type="float">
            <text:p>1400</text:p>
          </table:table-cell>
          <table:table-cell table:style-name="ce8" office:value-type="float" office:value="3200" calcext:value-type="float">
            <text:p>3200</text:p>
          </table:table-cell>
          <table:table-cell table:formula="of:=([.D53]*555)" office:value-type="float" office:value="842.275895481893" calcext:value-type="float">
            <text:p>842.275895481893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4-FAR-00006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Sserwadda Eria</text:p>
          </table:table-cell>
          <table:table-cell office:value-type="float" office:value="0.21376732473853" calcext:value-type="float">
            <text:p>0.21376732473853</text:p>
          </table:table-cell>
          <table:table-cell office:value-type="string" calcext:value-type="string">
            <text:p>Banana</text:p>
          </table:table-cell>
          <table:table-cell office:value-type="float" office:value="529" calcext:value-type="float">
            <text:p>529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table:formula="of:=([.D54]*555)" office:value-type="float" office:value="118.640865229884" calcext:value-type="float">
            <text:p>118.64086522988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5-FAR-00023</text:p>
          </table:table-cell>
          <table:table-cell table:style-name="ce8" office:value-type="string" calcext:value-type="string">
            <text:p>Ndugu - Bukomansimbi - Biganda</text:p>
          </table:table-cell>
          <table:table-cell table:style-name="ce8" office:value-type="string" calcext:value-type="string">
            <text:p>NAMAZZI JOICE</text:p>
          </table:table-cell>
          <table:table-cell table:style-name="ce8" office:value-type="float" office:value="1.5038424616867" calcext:value-type="float">
            <text:p>1.5038424616867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1785" calcext:value-type="float">
            <text:p>1785</text:p>
          </table:table-cell>
          <table:table-cell table:style-name="ce8" office:value-type="float" office:value="1780" calcext:value-type="float">
            <text:p>1780</text:p>
          </table:table-cell>
          <table:table-cell table:style-name="ce8" office:value-type="float" office:value="3200" calcext:value-type="float">
            <text:p>3200</text:p>
          </table:table-cell>
          <table:table-cell table:formula="of:=([.D55]*555)" office:value-type="float" office:value="834.632566236119" calcext:value-type="float">
            <text:p>834.632566236119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5-FAR-00024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NAKABONYE JANNET</text:p>
          </table:table-cell>
          <table:table-cell office:value-type="float" office:value="0.60587074533492" calcext:value-type="float">
            <text:p>0.60587074533492</text:p>
          </table:table-cell>
          <table:table-cell office:value-type="string" calcext:value-type="string">
            <text:p>Banana</text:p>
          </table:table-cell>
          <table:table-cell office:value-type="float" office:value="670" calcext:value-type="float">
            <text:p>67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table:formula="of:=([.D56]*555)" office:value-type="float" office:value="336.258263660881" calcext:value-type="float">
            <text:p>336.25826366088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2-FAR-00051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MWANJE VINCENT</text:p>
          </table:table-cell>
          <table:table-cell table:style-name="ce8" office:value-type="float" office:value="0.30511314779291" calcext:value-type="float">
            <text:p>0.30511314779291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50" calcext:value-type="float">
            <text:p>250</text:p>
          </table:table-cell>
          <table:table-cell table:formula="of:=([.D57]*555)" office:value-type="float" office:value="169.337797025065" calcext:value-type="float">
            <text:p>169.337797025065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4-FAR-00004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Ssentongo Charles</text:p>
          </table:table-cell>
          <table:table-cell office:value-type="float" office:value="0.13120448293241" calcext:value-type="float">
            <text:p>0.13120448293241</text:p>
          </table:table-cell>
          <table:table-cell office:value-type="string" calcext:value-type="string">
            <text:p>Banana,cassava,Other</text:p>
          </table:table-cell>
          <table:table-cell office:value-type="float" office:value="328" calcext:value-type="float">
            <text:p>328</text:p>
          </table:table-cell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formula="of:=([.D58]*555)" office:value-type="float" office:value="72.8184880274876" calcext:value-type="float">
            <text:p>72.8184880274876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2-FAR-00067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dawula Rehemah</text:p>
          </table:table-cell>
          <table:table-cell table:style-name="ce8" office:value-type="float" office:value="0.64414823223103" calcext:value-type="float">
            <text:p>0.64414823223103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00" calcext:value-type="float">
            <text:p>1300</text:p>
          </table:table-cell>
          <table:table-cell table:formula="of:=([.D59]*555)" office:value-type="float" office:value="357.502268888222" calcext:value-type="float">
            <text:p>357.502268888222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4-FAR-00005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Mukandutiye Mawurisiiya</text:p>
          </table:table-cell>
          <table:table-cell office:value-type="float" office:value="0.088966287014474" calcext:value-type="float">
            <text:p>0.088966287014474</text:p>
          </table:table-cell>
          <table:table-cell office:value-type="string" calcext:value-type="string">
            <text:p>Banana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table:formula="of:=([.D60]*555)" office:value-type="float" office:value="49.3762892930331" calcext:value-type="float">
            <text:p>49.376289293033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4-FAR-00004</text:p>
          </table:table-cell>
          <table:table-cell table:style-name="ce8" office:value-type="string" calcext:value-type="string">
            <text:p>Ndugu - Bukomansimbi - Biganda</text:p>
          </table:table-cell>
          <table:table-cell table:style-name="ce8" office:value-type="string" calcext:value-type="string">
            <text:p>Ssentongo Charles</text:p>
          </table:table-cell>
          <table:table-cell table:style-name="ce8" office:value-type="float" office:value="0.20962012664219" calcext:value-type="float">
            <text:p>0.20962012664219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519" calcext:value-type="float">
            <text:p>519</text:p>
          </table:table-cell>
          <table:table-cell table:formula="of:=([.D61]*555)" office:value-type="float" office:value="116.339170286415" calcext:value-type="float">
            <text:p>116.339170286415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5-FAR-00021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SSEBOWA PORINARI</text:p>
          </table:table-cell>
          <table:table-cell office:value-type="float" office:value="0.63134603603208" calcext:value-type="float">
            <text:p>0.63134603603208</text:p>
          </table:table-cell>
          <table:table-cell office:value-type="string" calcext:value-type="string">
            <text:p>Banana</text:p>
          </table:table-cell>
          <table:table-cell office:value-type="float" office:value="680" calcext:value-type="float">
            <text:p>680</text:p>
          </table:table-cell>
          <table:table-cell office:value-type="float" office:value="675" calcext:value-type="float">
            <text:p>675</text:p>
          </table:table-cell>
          <table:table-cell office:value-type="float" office:value="1050" calcext:value-type="float">
            <text:p>1050</text:p>
          </table:table-cell>
          <table:table-cell table:formula="of:=([.D62]*555)" office:value-type="float" office:value="350.397049997804" calcext:value-type="float">
            <text:p>350.39704999780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4-FAR-00005</text:p>
          </table:table-cell>
          <table:table-cell table:style-name="ce8" office:value-type="string" calcext:value-type="string">
            <text:p>Ndugu - Bukomansimbi - Biganda</text:p>
          </table:table-cell>
          <table:table-cell table:style-name="ce8" office:value-type="string" calcext:value-type="string">
            <text:p>Mukandutiye Mawurisiiya</text:p>
          </table:table-cell>
          <table:table-cell table:style-name="ce8" office:value-type="float" office:value="0.14022529588533" calcext:value-type="float">
            <text:p>0.14022529588533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254" calcext:value-type="float">
            <text:p>254</text:p>
          </table:table-cell>
          <table:table-cell table:formula="of:=([.D63]*555)" office:value-type="float" office:value="77.8250392163582" calcext:value-type="float">
            <text:p>77.8250392163582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2-FAR-00066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Lule Hadijah</text:p>
          </table:table-cell>
          <table:table-cell office:value-type="float" office:value="0.26151066999633" calcext:value-type="float">
            <text:p>0.26151066999633</text:p>
          </table:table-cell>
          <table:table-cell office:value-type="string" calcext:value-type="string">
            <text:p>Agroforestry (trees lower than 5 meter)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570" calcext:value-type="float">
            <text:p>570</text:p>
          </table:table-cell>
          <table:table-cell table:formula="of:=([.D64]*555)" office:value-type="float" office:value="145.138421847963" calcext:value-type="float">
            <text:p>145.138421847963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062-FAR-00050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AFUUMA RESTY</text:p>
          </table:table-cell>
          <table:table-cell table:style-name="ce8" office:value-type="float" office:value="0.1246462418855" calcext:value-type="float">
            <text:p>0.1246462418855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3" calcext:value-type="float">
            <text:p>123</text:p>
          </table:table-cell>
          <table:table-cell table:formula="of:=([.D65]*555)" office:value-type="float" office:value="69.1786642464525" calcext:value-type="float">
            <text:p>69.1786642464525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5-FAR-00020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KAYITESI REGINA</text:p>
          </table:table-cell>
          <table:table-cell office:value-type="float" office:value="0.37074492241662" calcext:value-type="float">
            <text:p>0.37074492241662</text:p>
          </table:table-cell>
          <table:table-cell office:value-type="string" calcext:value-type="string">
            <text:p>Banana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980" calcext:value-type="float">
            <text:p>980</text:p>
          </table:table-cell>
          <table:table-cell table:formula="of:=([.D66]*555)" office:value-type="float" office:value="205.763431941224" calcext:value-type="float">
            <text:p>205.763431941224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3-FAR-00054</text:p>
          </table:table-cell>
          <table:table-cell table:style-name="ce8" office:value-type="string" calcext:value-type="string">
            <text:p>Kitanda Tukole Farmers cooperative society</text:p>
          </table:table-cell>
          <table:table-cell table:style-name="ce8" office:value-type="string" calcext:value-type="string">
            <text:p>Nakintu Scovia</text:p>
          </table:table-cell>
          <table:table-cell table:style-name="ce8" office:value-type="float" office:value="0.19367002549068" calcext:value-type="float">
            <text:p>0.19367002549068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482" calcext:value-type="float">
            <text:p>482</text:p>
          </table:table-cell>
          <table:table-cell table:formula="of:=([.D67]*555)" office:value-type="float" office:value="107.486864147327" calcext:value-type="float">
            <text:p>107.486864147327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213-FAR-00055</text:p>
          </table:table-cell>
          <table:table-cell office:value-type="string" calcext:value-type="string">
            <text:p>Kitanda Tukole Farmers cooperative society</text:p>
          </table:table-cell>
          <table:table-cell office:value-type="string" calcext:value-type="string">
            <text:p>Namaganda Nsira</text:p>
          </table:table-cell>
          <table:table-cell office:value-type="float" office:value="0.19320809714058" calcext:value-type="float">
            <text:p>0.19320809714058</text:p>
          </table:table-cell>
          <table:table-cell office:value-type="string" calcext:value-type="string">
            <text:p>Banana,cassava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492" calcext:value-type="float">
            <text:p>492</text:p>
          </table:table-cell>
          <table:table-cell table:formula="of:=([.D68]*555)" office:value-type="float" office:value="107.230493913022" calcext:value-type="float">
            <text:p>107.230493913022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G20240417-6981</text:p>
          </table:table-cell>
          <table:table-cell table:style-name="ce8" office:value-type="string" calcext:value-type="string">
            <text:p>Ndugu - Bukomansimbi - Biganda</text:p>
          </table:table-cell>
          <table:table-cell table:style-name="ce8" office:value-type="string" calcext:value-type="string">
            <text:p>Ssentongo Hakisam</text:p>
          </table:table-cell>
          <table:table-cell table:style-name="ce8" office:value-type="float" office:value="1.2956920425814" calcext:value-type="float">
            <text:p>1.2956920425814</text:p>
          </table:table-cell>
          <table:table-cell table:style-name="ce8" office:value-type="string" calcext:value-type="string">
            <text:p>Banana</text:p>
          </table:table-cell>
          <table:table-cell table:style-name="ce8" office:value-type="float" office:value="1228" calcext:value-type="float">
            <text:p>1228</text:p>
          </table:table-cell>
          <table:table-cell table:style-name="ce8" office:value-type="float" office:value="1207" calcext:value-type="float">
            <text:p>1207</text:p>
          </table:table-cell>
          <table:table-cell table:style-name="ce8" office:value-type="float" office:value="3700" calcext:value-type="float">
            <text:p>3700</text:p>
          </table:table-cell>
          <table:table-cell table:formula="of:=([.D69]*555)" office:value-type="float" office:value="719.109083632677" calcext:value-type="float">
            <text:p>719.109083632677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NDU-18065-FAR-00019</text:p>
          </table:table-cell>
          <table:table-cell office:value-type="string" calcext:value-type="string">
            <text:p>Ndugu - Bukomansimbi - Biganda</text:p>
          </table:table-cell>
          <table:table-cell office:value-type="string" calcext:value-type="string">
            <text:p>SSEGGAYI FRED</text:p>
          </table:table-cell>
          <table:table-cell office:value-type="float" office:value="0.27069384009193" calcext:value-type="float">
            <text:p>0.27069384009193</text:p>
          </table:table-cell>
          <table:table-cell office:value-type="string" calcext:value-type="string">
            <text:p>Banana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table:formula="of:=([.D70]*555)" office:value-type="float" office:value="150.235081251021" calcext:value-type="float">
            <text:p>150.235081251021</text:p>
          </table:table-cell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NDU-18214-FAR-00002</text:p>
          </table:table-cell>
          <table:table-cell table:style-name="ce8" office:value-type="string" calcext:value-type="string">
            <text:p>Ndugu - Bukomansimbi - Biganda</text:p>
          </table:table-cell>
          <table:table-cell table:style-name="ce8" office:value-type="string" calcext:value-type="string">
            <text:p>Nabada Mariam</text:p>
          </table:table-cell>
          <table:table-cell table:style-name="ce10" office:value-type="float" office:value="0.21807939322813" calcext:value-type="float">
            <text:p>0.21807939322813</text:p>
          </table:table-cell>
          <table:table-cell table:style-name="ce10" office:value-type="string" calcext:value-type="string">
            <text:p>Banana,cassava,Other</text:p>
          </table:table-cell>
          <table:table-cell table:style-name="ce10" office:value-type="float" office:value="539" calcext:value-type="float">
            <text:p>539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512" calcext:value-type="float">
            <text:p>512</text:p>
          </table:table-cell>
          <table:table-cell table:formula="of:=([.D71]*555)" office:value-type="float" office:value="121.034063241612" calcext:value-type="float">
            <text:p>121.034063241612</text:p>
          </table:table-cell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44:10.879375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5-12-14T21:16:29</meta:creation-date>
    <dc:date>2025-12-17T21:03:04.403866871</dc:date>
    <meta:generator>LibreOffice/25.8.3.2$Linux_X86_64 LibreOffice_project/580$Build-2</meta:generator>
    <meta:editing-duration>PT10H46M53S</meta:editing-duration>
    <meta:editing-cycles>2</meta:editing-cycles>
    <meta:document-statistic meta:table-count="2" meta:cell-count="924" meta:object-count="0"/>
    <meta:user-defined meta:name="AppVersion">15.0300</meta:user-defined>
  </office:meta>
</office:document-meta>
</file>